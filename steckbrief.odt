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Name: Dennis</text:p>
      <text:p text:style-name="Standard">Landkreis: Göttingen</text:p>
      <text:p text:style-name="Standard">Alter: 38</text:p>
      <text:p text:style-name="Standard">Fan seit: 2001</text:p>
      <text:p text:style-name="Standard">Erstes Mal Stadion: FC Thun – VfL Wolfsburg, UI-Cup 2004</text:p>
      <text:p text:style-name="Standard">All-Time-Liebling: Diego Klimowicz</text:p>
      <text:p text:style-name="Standard">Lieblings-Klischee: "Ihr arbeitet alle bei VW!"</text:p>
      <text:p text:style-name="Standard"/>
      <text:p text:style-name="Standard">Was verbindet dich mit dem VfL? Wie bist du zum Verein gekommen? Was möchstest du zu deiner grün-weißen Liebe mitteilen?</text:p>
      <text:p text:style-name="Standard"/>
      <text:p text:style-name="Standard">Hi, ich bin Dennis und kann gar nicht den genauen Zeitpunkt benennen, in dem mich die grün-weiße Liebe gefangen hat. Ich weiß noch, wie ich damals mit 12,13 Jahren angefangen habe die Bundesliga per Radio zu verfolgen. Der VfL hatte Röber als Trainer, Klimowicz, Maric. Und da gewann der VfL oftmals mit 3:2 und ähnlichen Ergebnissen. Irgendwie fand ich alles sympathisch: Niedersachsen, nicht so weit weg, grün war meine Lieblingsfarbe, dieser lustige Song, den die immer bei Toren spielen, ein cooler argentinischer Riese mit langen Haaren ...deswegen wurde es auch nicht Werder, auf die ja auch einiges davon zutrifft.</text:p>
      <text:p text:style-name="Standard"/>
      <text:p text:style-name="Standard">Das erste Mal in Wolfsburg war ich dann gegen Thun da und ich mochte alles an dieser Stadt. Klar, es ist nicht Paris, aber der Weg zum Stadion, so viel Natur, dann die Architektur des Phaeton, der VW-Arena, ...ich hab nicht mal ein eigenes Auto, aber bin dennoch fasziniert zB von der Autowippe.</text:p>
      <text:p text:style-name="Standard"/>
      <text:p text:style-name="Standard">Etwas gelitten hat meine Liebe in der Zeit Magath II. Gefühlt 35 Abgänge, 30 Nezugänge, der VfL stand zu der Zeit für Nichts. Das ist es auch, was ich mir in der Zukunft wünsche, einen klaren taktischen Charakter der Mannschaft sowie 2,3 Spieler die über Jahre bleiben – als Leitwölfe. Der Rest kommt dann von selbst.</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4H35M29S</meta:editing-duration>
    <meta:editing-cycles>4</meta:editing-cycles>
    <meta:generator>OpenOffice/4.1.15$Win32 OpenOffice.org_project/4115m2$Build-9813</meta:generator>
    <dc:date>2026-05-29T13:25:27.69</dc:date>
    <dc:creator>Dennis </dc:creator>
    <meta:document-statistic meta:table-count="0" meta:image-count="0" meta:object-count="0" meta:page-count="1" meta:paragraph-count="11" meta:word-count="256" meta:character-count="1545"/>
    <meta:user-defined meta:name="Info 1"/>
    <meta:user-defined meta:name="Info 2"/>
    <meta:user-defined meta:name="Info 3"/>
    <meta:user-defined meta:name="Info 4"/>
  </office:meta>
</office:document-meta>
</file>